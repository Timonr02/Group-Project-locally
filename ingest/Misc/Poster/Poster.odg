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A000002BBFAE7C90B.png" manifest:media-type="image/png"/>
  <manifest:file-entry manifest:full-path="Pictures/100000010000038D000002A4E9036D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67cm" svg:height="6.668cm" svg:x="3.78cm" svg:y="12.429cm">
          <draw:image xlink:href="Pictures/100000010000038D000002A4E9036D06.png" xlink:type="simple" xlink:show="embed" xlink:actuate="onLoad" draw:mime-type="image/png">
            <text:p/>
          </draw:image>
        </draw:frame>
        <draw:frame draw:style-name="gr1" draw:text-style-name="P1" draw:layer="layout" svg:width="5.927cm" svg:height="5.115cm" svg:x="16.663cm" svg:y="13.065cm">
          <draw:image xlink:href="Pictures/100000010000032A000002BBFAE7C90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23:06:00.693682645</meta:creation-date>
    <dc:date>2025-05-11T00:48:19.928652292</dc:date>
    <meta:editing-duration>PT1H30M12S</meta:editing-duration>
    <meta:editing-cycles>2</meta:editing-cycles>
    <meta:generator>LibreOffice/24.8.6.2$Linux_X86_64 LibreOffice_project/480$Build-2</meta:generator>
    <meta:document-statistic meta:object-count="2"/>
  </office:meta>
</office:document-meta>
</file>